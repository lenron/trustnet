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bd70" officeooo:paragraph-rsid="0019bd7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9bd70" officeooo:paragraph-rsid="0019bd70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19bd70" officeooo:paragraph-rsid="0019bd7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a0f58" officeooo:paragraph-rsid="001a0f5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e97d5" officeooo:paragraph-rsid="001e97d5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9bd70" officeooo:paragraph-rsid="0019bd70" style:font-size-asian="14pt" style:font-weight-asian="bold" style:font-size-complex="14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1a0f58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1a0f58"/>
    </style:style>
    <style:style style:name="P9" style:family="paragraph" style:parent-style-name="Standard">
      <style:paragraph-properties fo:text-align="start" style:justify-single-word="false"/>
      <style:text-properties officeooo:paragraph-rsid="001cf1c4"/>
    </style:style>
    <style:style style:name="P10" style:family="paragraph" style:parent-style-name="Standard" style:list-style-name="L12">
      <style:paragraph-properties fo:text-align="start" style:justify-single-word="false"/>
      <style:text-properties officeooo:paragraph-rsid="001cf1c4"/>
    </style:style>
    <style:style style:name="P11" style:family="paragraph" style:parent-style-name="Standard" style:list-style-name="L13">
      <style:paragraph-properties fo:text-align="start" style:justify-single-word="false"/>
      <style:text-properties officeooo:paragraph-rsid="001cf1c4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1a0f58" officeooo:paragraph-rsid="001a0f58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c0c76" officeooo:paragraph-rsid="001c0c76"/>
    </style:style>
    <style:style style:name="P14" style:family="paragraph" style:parent-style-name="Standard">
      <style:paragraph-properties fo:text-align="start" style:justify-single-word="false"/>
      <style:text-properties officeooo:rsid="001c0c76" officeooo:paragraph-rsid="001c0c76"/>
    </style:style>
    <style:style style:name="P15" style:family="paragraph" style:parent-style-name="Standard" style:list-style-name="L4">
      <style:paragraph-properties fo:text-align="start" style:justify-single-word="false"/>
      <style:text-properties officeooo:rsid="001c0c76" officeooo:paragraph-rsid="001c0c76"/>
    </style:style>
    <style:style style:name="P16" style:family="paragraph" style:parent-style-name="Standard" style:list-style-name="L4">
      <style:paragraph-properties fo:text-align="start" style:justify-single-word="false"/>
      <style:text-properties officeooo:rsid="001c0c76" officeooo:paragraph-rsid="001cf1c4"/>
    </style:style>
    <style:style style:name="P17" style:family="paragraph" style:parent-style-name="Standard">
      <style:paragraph-properties fo:text-align="start" style:justify-single-word="false"/>
      <style:text-properties officeooo:rsid="001c0c76" officeooo:paragraph-rsid="001cf1c4"/>
    </style:style>
    <style:style style:name="P18" style:family="paragraph" style:parent-style-name="Standard" style:list-style-name="L11">
      <style:paragraph-properties fo:text-align="start" style:justify-single-word="false"/>
      <style:text-properties officeooo:rsid="001cf1c4" officeooo:paragraph-rsid="001cf1c4"/>
    </style:style>
    <style:style style:name="P19" style:family="paragraph" style:parent-style-name="Standard" style:list-style-name="L12">
      <style:paragraph-properties fo:text-align="start" style:justify-single-word="false"/>
      <style:text-properties officeooo:rsid="001cf1c4" officeooo:paragraph-rsid="001cf1c4"/>
    </style:style>
    <style:style style:name="P20" style:family="paragraph" style:parent-style-name="Standard" style:list-style-name="L4">
      <style:paragraph-properties fo:text-align="start" style:justify-single-word="false"/>
      <style:text-properties officeooo:rsid="001cf1c4" officeooo:paragraph-rsid="001cf1c4"/>
    </style:style>
    <style:style style:name="P21" style:family="paragraph" style:parent-style-name="Standard" style:list-style-name="L14">
      <style:paragraph-properties fo:text-align="start" style:justify-single-word="false"/>
      <style:text-properties officeooo:rsid="001cf1c4" officeooo:paragraph-rsid="001cf1c4"/>
    </style:style>
    <style:style style:name="T1" style:family="text">
      <style:text-properties officeooo:rsid="0019bd70"/>
    </style:style>
    <style:style style:name="T2" style:family="text">
      <style:text-properties officeooo:rsid="001a0f5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0f58" style:font-weight-asian="normal" style:font-weight-complex="normal"/>
    </style:style>
    <style:style style:name="T5" style:family="text">
      <style:text-properties fo:font-weight="normal" officeooo:rsid="001c0c76" style:font-weight-asian="normal" style:font-weight-complex="normal"/>
    </style:style>
    <style:style style:name="T6" style:family="text">
      <style:text-properties fo:font-weight="normal" officeooo:rsid="001cf1c4" style:font-weight-asian="normal" style:font-weight-complex="normal"/>
    </style:style>
    <style:style style:name="T7" style:family="text">
      <style:text-properties style:text-position="super 58%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dditional notes for the 7-byte-random-value specification</text:p>
      <text:p text:style-name="P1"/>
      <text:p text:style-name="P2">When the site first loads, we want to perform computationally expensive 7-byte-value matching in the background.</text:p>
      <text:p text:style-name="P2"/>
      <text:p text:style-name="P2">Theses are the two data structures we create at site load:</text:p>
      <text:list text:style-name="L1">
        <text:list-item>
          <text:p text:style-name="P3"><text:span text:style-name="T2">S1 - </text:span>Structure One is just a hash populated with 0-528 as keys, and the corresponding representative 7-bytes as values. <text:s/>(this assumes – perhaps incorrectly – that 528 is the maximum number of bytes we can input into our OBF function)</text:p>
        </text:list-item>
        <text:list-item>
          <text:p text:style-name="P3"><text:span text:style-name="T2">S2 - </text:span>Structure Two is a hash containing 0-9 as keys, and the value for each key is a hash with the same structure as Structure One (i.e. we’ll have ten hashes total, with each hash different 7-byte solutions for all 528 numbers)</text:p>
        </text:list-item>
      </text:list>
      <text:p text:style-name="P2"/>
      <text:p text:style-name="P2">Create function findAll7byteValues() that runs when the site first loads and returns a<text:span text:style-name="T2">n S1 </text:span>hash.</text:p>
      <text:p text:style-name="P2"/>
      <text:p text:style-name="P4">Create function createMultiple7byteHashes() that will run <text:span text:style-name="T1">findAll7byteValues() </text:span>ten times and return our S2 Hash.</text:p>
      <text:p text:style-name="P4"/>
      <text:p text:style-name="P4">We also need a function get7byteFromS1(num) that will:</text:p>
      <text:list xml:id="list337650785" text:style-name="L2">
        <text:list-item>
          <text:p text:style-name="P7"><text:span text:style-name="T4">1. check that a 7-byte value for the given key (i.e. num) is defined</text:span></text:p>
        </text:list-item>
      </text:list>
      <text:list text:style-name="L3">
        <text:list-item>
          <text:list>
            <text:list-item>
              <text:p text:style-name="P8"><text:span text:style-name="T4">If it is not defined, run findOneValueS1(num) which will find the 7-byte value for that particular number and store it in S1.</text:span></text:p>
            </text:list-item>
          </text:list>
        </text:list-item>
      </text:list>
      <text:list text:continue-list="list337650785" text:style-name="L2">
        <text:list-item>
          <text:p text:style-name="P12"><text:span text:style-name="T3">Then, we will copy the key/value pair (to be returned) to a variable.</text:span></text:p>
        </text:list-item>
        <text:list-item>
          <text:p text:style-name="P12"><text:span text:style-name="T3">Then we will delete the value for that key, so that it is never used again</text:span></text:p>
        </text:list-item>
        <text:list-item>
          <text:p text:style-name="P12"><text:span text:style-name="T3">Then we will call findOne</text:span><text:span text:style-name="T5">ValueS1(num) to repopulate a 7-byte combo for num (ideally called asynchronously to not delay the return of our key/value pair)</text:span></text:p>
        </text:list-item>
        <text:list-item>
          <text:p text:style-name="P13"><text:span text:style-name="T3">And finally return our key/value pair</text:span></text:p>
        </text:list-item>
      </text:list>
      <text:p text:style-name="P14"><text:span text:style-name="T3"/></text:p>
      <text:p text:style-name="P17"><text:span text:style-name="T3">We also need a function verifyS2Complete that verifies that our S2 structure has been fully populated by </text:span><text:span text:style-name="T4">createMultiple7byteHashes</text:span><text:span text:style-name="T3">() before we attempt to pull values from it.</text:span><text:span text:style-name="T6"> It will:</text:span></text:p>
      <text:list text:style-name="L14">
        <text:list-item>
          <text:p text:style-name="P21"><text:span text:style-name="T3">Run sequentially through each of the 10 hashes and all of their keys, verifying that for each one of them, they have valid 7-byte values.</text:span></text:p>
        </text:list-item>
        <text:list-item>
          <text:p text:style-name="P21"><text:span text:style-name="T3">If S2 is not complete, run <text:s/></text:span><text:span text:style-name="T4">createMultiple7byteHashes</text:span><text:span text:style-name="T3">() and do not return (i.e. block further code execution) until verifyS2Complete() returns true.</text:span></text:p>
        </text:list-item>
      </text:list>
      <text:p text:style-name="P14"><text:span text:style-name="T3"/></text:p>
      <text:p text:style-name="P9"><text:span text:style-name="T6">When we pull a value from S2, we will call function getRand7byteValueFromS2():</text:span></text:p>
      <text:list xml:id="list2433574977" text:style-name="L12">
        <text:list-item>
          <text:p text:style-name="P10"><text:span text:style-name="T6">Which will randomly pick one of the 10 hashes, and then from that hash, randomly pick one of the 528 numbers, and copy the 7-byte value at that location.</text:span></text:p>
        </text:list-item>
      </text:list>
      <text:list text:style-name="L13">
        <text:list-item>
          <text:list>
            <text:list-item>
              <text:p text:style-name="P11"><text:span text:style-name="T6">If there is no value at that location, <text:s/>getRand7byteValueFromS2() will be called in a loop until a valid value is found</text:span></text:p>
            </text:list-item>
          </text:list>
        </text:list-item>
      </text:list>
      <text:list text:continue-list="list2433574977" text:style-name="L12">
        <text:list-item>
          <text:p text:style-name="P19"><text:span text:style-name="T3">Now that we have our random 7-byte value, that value will be deleted from the corresponding hash in S2, so that it never gets used again.</text:span></text:p>
        </text:list-item>
      </text:list>
      <text:p text:style-name="P9"><text:span text:style-name="T6"/></text:p>
      <text:list text:style-name="L11">
        <text:list-header>
          <text:p text:style-name="P18"><text:span text:style-name="T3"/></text:p>
        </text:list-header>
      </text:list>
      <text:p text:style-name="P14"><text:span text:style-name="T3"/></text:p>
      <text:p text:style-name="P14"><text:span text:style-name="T3">Over 90% of all random 7-byte sequences are valid for mapping 0-520 numbers, but their distribution is uneven, and then there’s that pesky 5-10% that don’t properly map. <text:s/>In order to address this, we’re going to ensure that all such 7-byte indexes in our no-password database are overwritten with valid 7-byte values to thwart all attack vectors.</text:span></text:p>
      <text:list text:style-name="L4">
        <text:list-item>
          <text:p text:style-name="P15"><text:soft-page-break/><text:span text:style-name="T3">First, the random ~1,000,000 </text:span><text:span text:style-name="T6">raw </text:span><text:span text:style-name="T3">bytes </text:span><text:span text:style-name="T6">(i.e. not base64 yet at this point) </text:span><text:span text:style-name="T3">for the no-password database will be generated</text:span></text:p>
        </text:list-item>
        <text:list-item>
          <text:p text:style-name="P20"><text:span text:style-name="T3">Then we will verify that S2 is complete by checking that verifyS2Complete() returns true.</text:span></text:p>
        </text:list-item>
        <text:list-item>
          <text:p text:style-name="P16"><text:span text:style-name="T3">Then, for every 1000 bytes (i.e. every possible data index </text:span><text:span text:style-name="T6">in the database</text:span><text:span text:style-name="T3">), we will overwrite </text:span><text:span text:style-name="T6">the starting 7-bytes of that particular index with a randomly chosen value from S2 (we will get this random value by calling getRand7byteValueFromS2() ).</text:span></text:p>
        </text:list-item>
      </text:list>
      <text:p text:style-name="P5"/>
      <text:p text:style-name="P5">By populating the database with 7-byte combos pulled from S2, it allows us to choose at random from over 5000 7-byte random values, ensuring that we both repeat numbers, omit numbers, and do so using a non-biased distribution, all of which is key to thwarting would-be attackers.</text:p>
      <text:p text:style-name="P5"/>
      <text:p text:style-name="P5"/>
      <text:p text:style-name="P5"/>
      <text:p text:style-name="P5">Side note: in order for an attacker to map all 7-byte random numbers, they would need to fill a hard drive with 256<text:span text:style-name="T7">7</text:span> bytes, which is over 72,000 terabytes of data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5T11:13:52.964988660</meta:creation-date>
    <dc:date>2026-03-25T12:19:05.660859351</dc:date>
    <meta:editing-duration>PT15S</meta:editing-duration>
    <meta:editing-cycles>1</meta:editing-cycles>
    <meta:document-statistic meta:table-count="0" meta:image-count="0" meta:object-count="0" meta:page-count="2" meta:paragraph-count="27" meta:word-count="633" meta:character-count="3708" meta:non-whitespace-character-count="3112"/>
    <meta:generator>LibreOffice/24.2.7.2$Linux_X86_64 LibreOffice_project/420$Build-2</meta:generator>
  </office:meta>
</office:document-meta>
</file>